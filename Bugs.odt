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3713" officeooo:paragraph-rsid="0024ad55"/>
    </style:style>
    <style:style style:name="T1" style:family="text">
      <style:text-properties officeooo:rsid="0024ad55"/>
    </style:style>
    <style:style style:name="T2" style:family="text">
      <style:text-properties officeooo:rsid="00288e13"/>
    </style:style>
    <style:style style:name="T3" style:family="text">
      <style:text-properties officeooo:rsid="001da437"/>
    </style:style>
    <style:style style:name="T4" style:family="text">
      <style:text-properties officeooo:rsid="001e118d"/>
    </style:style>
    <style:style style:name="T5" style:family="text">
      <style:text-properties officeooo:rsid="0029c933"/>
    </style:style>
    <style:style style:name="T6" style:family="text">
      <style:text-properties officeooo:rsid="001f56b5"/>
    </style:style>
    <style:style style:name="T7" style:family="text">
      <style:text-properties officeooo:rsid="00208aab"/>
    </style:style>
    <style:style style:name="T8" style:family="text">
      <style:text-properties officeooo:rsid="001ca2ba"/>
    </style:style>
    <style:style style:name="T9" style:family="text">
      <style:text-properties officeooo:rsid="00208d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text:s/><text:span text:style-name="T2">In advanced all offsets should be visible.</text:span><text:span text:style-name="T3"><text:line-break/><text:line-break/></text:span><text:span text:style-name="T2">2.</text:span><text:span text:style-name="T4"> There is no helpers on the set offsets and other items. Helpers should be for every item of the menu.</text:span><text:span text:style-name="T3"><text:line-break/></text:span><text:span text:style-name="T2">3.</text:span><text:span text:style-name="T3"> “</text:span><text:span text:style-name="T4">Compress document” </text:span><text:span text:style-name="T2">name</text:span><text:span text:style-name="T4"> may be should be revised? The name is not the best.<text:line-break/></text:span><text:span text:style-name="T5">4. Order fro page split 1 top left, 2 bottom left, 3 top right, 4 bottom right.</text:span><text:span text:style-name="T4"><text:line-break/> <text:line-break/></text:span><text:span text:style-name="T2">4. </text:span><text:span text:style-name="T6">The info like page number, coordinates on the right bottom corner should be not on the separate field, but on the on the top of the opened page. (page should be down to the bottom of the window) <text:line-break/></text:span><text:span text:style-name="T2">5.</text:span><text:span text:style-name="T6"> </text:span><text:span text:style-name="T7">Some elements have size of font less then other. All fonts(except number of splits on the page) should have one size of the font. Including helpers.<text:line-break/><text:line-break/></text:span><text:span text:style-name="T2">6. </text:span><text:span text:style-name="T7">The design of the crop windows should be like before. <text:s/></text:span><text:span text:style-name="T2">Dashed window, bigrer square at the corner and moddle of the sides, 30% bigger then main font number of the splits in the cercles. </text:span><text:line-break/><text:line-break/><text:span text:style-name="T2">7</text:span>. Ratio windows should be populated by initial documents or drawn/ created crop window not empty. <text:span text:style-name="T8">Should be adjusted just after auto detect, not after auto detect and firs page change in navigation.</text:span><text:line-break/><text:span text:style-name="T2">8</text:span>. Status bar is still palatially drawn during some processing, freezing with others. <text:span text:style-name="T7">Scroll of the left tab also freezy.</text:span> <text:line-break/><text:span text:style-name="T2">9</text:span>. <text:span text:style-name="T4">Auto detect does not work correctly on the second press.</text:span><text:line-break/><text:span text:style-name="T2">10</text:span>. The navigation become slow.<text:line-break/><text:span text:style-name="T8">1</text:span><text:span text:style-name="T2">1</text:span><text:span text:style-name="T8">. The right button still magnify the page, not to set the crop window.<text:line-break/><text:line-break/>1</text:span><text:span text:style-name="T2">2</text:span><text:span text:style-name="T8">. There is no name of the file/files on the top of the window. (len of the name should limited the name of the first file + … if there are many files.)<text:line-break/></text:span><text:span text:style-name="T3">1</text:span><text:span text:style-name="T2">3</text:span><text:span text:style-name="T3">. Strength in filters not active before filter applied, it should can be selected before filter applied.<text:line-break/>1</text:span><text:span text:style-name="T2">4</text:span><text:span text:style-name="T3">. Items All/Odd/Even/Selected in menu blink than I press anything. </text:span><text:span text:style-name="T6">Other items blinked with some presses.<text:line-break/>1</text:span><text:span text:style-name="T2">5</text:span><text:span text:style-name="T6">. After I change page selection the stateful button should drop the state.<text:line-break/></text:span><text:span text:style-name="T9">1</text:span><text:span text:style-name="T2">6</text:span><text:span text:style-name="T9">. If I selected split to 2/4 pages the button crop should labeled Split &amp; Cro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9T00:29:48.315898300</meta:creation-date>
    <dc:date>2026-06-29T14:18:24.654604000</dc:date>
    <meta:editing-duration>PT1H36M14S</meta:editing-duration>
    <meta:editing-cycles>6</meta:editing-cycles>
    <meta:generator>LibreOffice/25.2.7.2$Windows_X86_64 LibreOffice_project/5cbfd1ab6520636bb5f7b99185aa69bd7456825d</meta:generator>
    <meta:document-statistic meta:table-count="0" meta:image-count="0" meta:object-count="0" meta:page-count="1" meta:paragraph-count="1" meta:word-count="340" meta:character-count="1873" meta:non-whitespace-character-count="1523"/>
  </office:meta>
</office:document-meta>
</file>